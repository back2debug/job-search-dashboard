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Applications">
        <table:table-row>
          <table:table-cell office:value-type="string" table:style-name="HeaderCell">
            <text:p>Company</text:p>
          </table:table-cell>
          <table:table-cell office:value-type="string" table:style-name="HeaderCell">
            <text:p>Applied</text:p>
          </table:table-cell>
          <table:table-cell office:value-type="string" table:style-name="HeaderCell">
            <text:p>Title</text:p>
          </table:table-cell>
          <table:table-cell office:value-type="string" table:style-name="HeaderCell">
            <text:p>In Play</text:p>
          </table:table-cell>
          <table:table-cell office:value-type="string" table:style-name="HeaderCell">
            <text:p>Recruiter</text:p>
          </table:table-cell>
          <table:table-cell office:value-type="string" table:style-name="HeaderCell">
            <text:p>Hiring</text:p>
          </table:table-cell>
          <table:table-cell office:value-type="string" table:style-name="HeaderCell">
            <text:p>Test</text:p>
          </table:table-cell>
          <table:table-cell office:value-type="string" table:style-name="HeaderCell">
            <text:p>Followups</text:p>
          </table:table-cell>
          <table:table-cell office:value-type="string" table:style-name="HeaderCell">
            <text:p>Rejection</text:p>
          </table:table-cell>
          <table:table-cell office:value-type="string" table:style-name="HeaderCell">
            <text:p>Ghosted</text:p>
          </table:table-cell>
          <table:table-cell office:value-type="string" table:style-name="HeaderCell">
            <text:p>Should not have applied</text:p>
          </table:table-cell>
          <table:table-cell office:value-type="string" table:style-name="HeaderCell">
            <text:p>Not Moving forward</text:p>
          </table:table-cell>
          <table:table-cell office:value-type="string" table:style-name="HeaderCell">
            <text:p>Withdraw</text:p>
          </table:table-cell>
        </table:table-row>
        <table:table-row>
          <table:table-cell office:value-type="string">
            <text:p>Acme Corp</text:p>
          </table:table-cell>
          <table:table-cell office:value-type="string">
            <text:p>01-2026</text:p>
          </table:table-cell>
          <table:table-cell office:value-type="string">
            <text:p>Support Eng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a Inc</text:p>
          </table:table-cell>
          <table:table-cell office:value-type="string">
            <text:p>01-2026</text:p>
          </table:table-cell>
          <table:table-cell office:value-type="string">
            <text:p>Impl Eng</text:p>
          </table:table-cell>
          <table:table-cell/>
          <table:table-cell office:value-type="string">
            <text:p>x</text:p>
          </table:table-cell>
          <table:table-cell/>
          <table:table-cell/>
          <table:table-cell/>
          <table:table-cell office:value-type="string">
            <text:p>x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Gamma LLC</text:p>
          </table:table-cell>
          <table:table-cell office:value-type="string">
            <text:p>02-2026</text:p>
          </table:table-cell>
          <table:table-cell office:value-type="string">
            <text:p>Solutions Eng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x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eaderCell" style:family="table-cell" style:display-name="HeaderCell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